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5000000851A2A84D0.png" manifest:media-type="image/png"/>
  <manifest:file-entry manifest:full-path="Pictures/10000001000005B8000003289B6EBB8C.png" manifest:media-type="image/png"/>
  <manifest:file-entry manifest:full-path="Pictures/100000010000035A000002861D67D48B.png" manifest:media-type="image/png"/>
  <manifest:file-entry manifest:full-path="Pictures/10000001000003DE00000295C885A261.png" manifest:media-type="image/png"/>
  <manifest:file-entry manifest:full-path="Pictures/100000010000077A000003A85DF9584C.png" manifest:media-type="image/png"/>
  <manifest:file-entry manifest:full-path="Pictures/1000000100000391000002B6419E8A49.png" manifest:media-type="image/png"/>
  <manifest:file-entry manifest:full-path="Pictures/100000010000073C0000037C46B070DC.png" manifest:media-type="image/png"/>
  <manifest:file-entry manifest:full-path="Pictures/10000000000005E2000004DEEC062B6B.jpg" manifest:media-type="image/jpeg"/>
  <manifest:file-entry manifest:full-path="Pictures/1000000100000447000002B2C5226910.png" manifest:media-type="image/png"/>
  <manifest:file-entry manifest:full-path="Pictures/100000010000029A0000032C5BA5690F.png" manifest:media-type="image/png"/>
  <manifest:file-entry manifest:full-path="Pictures/100000010000023D00000291A5A749F0.png" manifest:media-type="image/png"/>
  <manifest:file-entry manifest:full-path="Pictures/1000000100000760000003A6C06D8C4F.png" manifest:media-type="image/png"/>
  <manifest:file-entry manifest:full-path="Pictures/10000001000006FB0000039761EC5A0C.png" manifest:media-type="image/png"/>
  <manifest:file-entry manifest:full-path="Pictures/100000010000074C0000037F08158C42.png" manifest:media-type="image/png"/>
  <manifest:file-entry manifest:full-path="Pictures/10000001000006D20000037D26116B0C.png" manifest:media-type="image/png"/>
  <manifest:file-entry manifest:full-path="Pictures/100000010000073C0000038383CD7A8A.png" manifest:media-type="image/png"/>
  <manifest:file-entry manifest:full-path="Pictures/100000010000075E000003994AA31419.png" manifest:media-type="image/png"/>
  <manifest:file-entry manifest:full-path="Pictures/100000010000074500000388D3E7BD6A.png" manifest:media-type="image/png"/>
  <manifest:file-entry manifest:full-path="Pictures/10000001000007330000037D7E4CA6FA.png" manifest:media-type="image/png"/>
  <manifest:file-entry manifest:full-path="Pictures/100000010000074D00000379D5244B78.png" manifest:media-type="image/png"/>
  <manifest:file-entry manifest:full-path="Pictures/10000001000007210000039B94A69F0E.png" manifest:media-type="image/png"/>
  <manifest:file-entry manifest:full-path="Pictures/10000001000006DC0000031988AC876A.png" manifest:media-type="image/png"/>
  <manifest:file-entry manifest:full-path="Pictures/100000010000073E0000037715D281B7.png" manifest:media-type="image/png"/>
  <manifest:file-entry manifest:full-path="Pictures/100000010000073D0000038126625B14.png" manifest:media-type="image/png"/>
  <manifest:file-entry manifest:full-path="Pictures/10000001000007360000036A519C83EE.png" manifest:media-type="image/png"/>
  <manifest:file-entry manifest:full-path="Pictures/10000001000007450000039AEAF779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margin-left="0in" fo:text-align="center" style:justify-single-word="false" fo:text-indent="0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Contents_20_1">
      <style:paragraph-properties>
        <style:tab-stops>
          <style:tab-stop style:position="6.269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0728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acb93" officeooo:paragraph-rsid="001acb9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1acb93" officeooo:paragraph-rsid="001acb93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normal" fo:font-weight="bold" officeooo:rsid="001acb93" officeooo:paragraph-rsid="001acb93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italic" fo:font-weight="normal" officeooo:rsid="001acb93" officeooo:paragraph-rsid="001acb93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acb93" officeooo:paragraph-rsid="001acb93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1acb93" officeooo:paragraph-rsid="001acb93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weight="bold" officeooo:paragraph-rsid="001f06fe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paragraph-rsid="001f06f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paragraph-rsid="001f06fe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f8935" officeooo:paragraph-rsid="001f8935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margin-left="0in" fo:text-align="start" style:justify-single-word="false" fo:text-indent="0in" style:auto-text-indent="false"/>
      <style:text-properties fo:font-size="14pt" fo:font-style="normal" fo:font-weight="bold" officeooo:rsid="0021c49d" officeooo:paragraph-rsid="0021c49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1c49d" officeooo:paragraph-rsid="0021c49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32280" officeooo:paragraph-rsid="0023e158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3e158" officeooo:paragraph-rsid="0023e158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532b2" officeooo:paragraph-rsid="002532b2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in" fo:text-align="start" style:justify-single-word="false" fo:text-indent="0in" style:auto-text-indent="false"/>
      <style:text-properties officeooo:paragraph-rsid="002532b2"/>
    </style:style>
    <style:style style:name="P26" style:family="paragraph" style:parent-style-name="Standard">
      <style:paragraph-properties fo:margin-left="0in" fo:text-align="start" style:justify-single-word="false" fo:text-indent="0in" style:auto-text-indent="false"/>
      <style:text-properties officeooo:rsid="00278b56" officeooo:paragraph-rsid="00278b56"/>
    </style:style>
    <style:style style:name="P27" style:family="paragraph" style:parent-style-name="Standard">
      <style:paragraph-properties fo:margin-left="0in" fo:text-align="start" style:justify-single-word="false" fo:text-indent="0in" style:auto-text-indent="false"/>
      <style:text-properties fo:font-style="italic" officeooo:rsid="00278b56" officeooo:paragraph-rsid="00278b56" style:font-style-asian="italic" style:font-style-complex="italic"/>
    </style:style>
    <style:style style:name="P28" style:family="paragraph" style:parent-style-name="Standard">
      <style:paragraph-properties fo:margin-left="0in" fo:text-align="start" style:justify-single-word="false" fo:text-indent="0in" style:auto-text-indent="false"/>
      <style:text-properties officeooo:paragraph-rsid="0028d112"/>
    </style:style>
    <style:style style:name="P29" style:family="paragraph" style:parent-style-name="Standard">
      <style:paragraph-properties fo:margin-left="0in" fo:text-align="start" style:justify-single-word="false" fo:text-indent="0in" style:auto-text-indent="false"/>
      <style:text-properties officeooo:rsid="0028d112" officeooo:paragraph-rsid="0028d112"/>
    </style:style>
    <style:style style:name="P30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paragraph-rsid="0028d112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Heading_20_2">
      <style:paragraph-properties fo:margin-top="0in" fo:margin-bottom="0in" style:contextual-spacing="false"/>
    </style:style>
    <style:style style:name="P32" style:family="paragraph" style:parent-style-name="Standard">
      <style:paragraph-properties fo:margin-left="0in" fo:text-align="start" style:justify-single-word="false" fo:text-indent="0in" style:auto-text-indent="false"/>
      <style:text-properties fo:font-style="normal" officeooo:paragraph-rsid="002c153e" style:font-style-asian="normal" style:font-style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a584d"/>
    </style:style>
    <style:style style:name="T3" style:family="text">
      <style:text-properties officeooo:rsid="00355e45"/>
    </style:style>
    <style:style style:name="T4" style:family="text">
      <style:text-properties officeooo:rsid="002e4aa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0fabd"/>
    </style:style>
    <style:style style:name="T8" style:family="text">
      <style:text-properties fo:font-style="normal" officeooo:rsid="001f06fe" style:font-style-asian="normal" style:font-style-complex="normal"/>
    </style:style>
    <style:style style:name="T9" style:family="text">
      <style:text-properties officeooo:rsid="001f8935"/>
    </style:style>
    <style:style style:name="T10" style:family="text">
      <style:text-properties officeooo:rsid="00232280"/>
    </style:style>
    <style:style style:name="T11" style:family="text">
      <style:text-properties fo:font-size="13pt" fo:font-style="italic" fo:font-weight="bold" officeooo:rsid="0023e158" style:font-size-asian="13pt" style:font-style-asian="italic" style:font-weight-asian="bold" style:font-size-complex="13pt" style:font-style-complex="italic" style:font-weight-complex="bold"/>
    </style:style>
    <style:style style:name="T12" style:family="text">
      <style:text-properties officeooo:rsid="00278b56"/>
    </style:style>
    <style:style style:name="T13" style:family="text">
      <style:text-properties fo:font-size="12pt" fo:font-style="italic" fo:font-weight="normal" officeooo:rsid="002532b2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normal" fo:font-weight="normal" officeooo:rsid="002532b2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2532b2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28d112"/>
    </style:style>
    <style:style style:name="T18" style:family="text">
      <style:text-properties fo:font-style="italic" officeooo:rsid="0028d112" style:font-style-asian="italic" style:font-style-complex="italic"/>
    </style:style>
    <style:style style:name="T19" style:family="text">
      <style:text-properties fo:font-size="12pt" fo:font-weight="normal" officeooo:rsid="002c153e" style:font-size-asian="12pt" style:font-weight-asian="normal" style:font-size-complex="12pt" style:font-weight-complex="normal"/>
    </style:style>
    <style:style style:name="T20" style:family="text">
      <style:text-properties officeooo:rsid="002e0b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Inline_20_Heading">
      <style:graphic-properties style:vertical-pos="middle" style:vertical-rel="tex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26" text:anchor-type="char" svg:width="6.2701in" svg:height="0.8937in" draw:z-index="25"><draw:image xlink:href="Pictures/10000001000003A5000000851A2A84D0.png" xlink:type="simple" xlink:show="embed" xlink:actuate="onLoad" draw:mime-type="image/png"/></draw:frame></text:p>
      <text:p text:style-name="P1">BIT3208: Advanced Web Design and Development </text:p>
      <text:p text:style-name="P2">Logbook Report </text:p>
      <text:p text:style-name="P3"><text:span text:style-name="T1">Student Name:</text:span> <text:span text:style-name="T2">Abdullahi Mohammed Mahid.</text:span></text:p>
      <text:p text:style-name="P3"><text:span text:style-name="T1">Admission Number:</text:span> <text:span text:style-name="T2">BSCCS/2024/38409</text:span></text:p>
      <text:p text:style-name="P2">Course/Class: </text:p>
      <text:p text:style-name="P3"><text:span text:style-name="T1">Unit Code</text:span>: <text:span text:style-name="T2">BIT3208</text:span></text:p>
      <text:p text:style-name="P3"><text:span text:style-name="T1">Unit Name: </text:span>Advanced Web Design and Development </text:p>
      <text:p text:style-name="P4">Lecturer Name: <text:span text:style-name="T3">Michael Nyoro</text:span></text:p>
      <text:p text:style-name="P3"><text:span text:style-name="T1">Semester/Year</text:span>: <text:span text:style-name="T2">Sem II ,Year IV</text:span></text:p>
      <text:p text:style-name="P3"/>
      <text:p text:style-name="P4">Project Title: <text:span text:style-name="T4">Blackline Supply</text:span></text:p>
      <text:p text:style-name="P2">Technologies: PHP + MySQL, HTML5, CSS3, JavaScript, Bootstrap </text:p>
      <text:p text:style-name="P3"><text:span text:style-name="T1">GitHub Repository</text:span>: <text:a xlink:type="simple" xlink:href="https://github.com/abdullahimahid95/BIT3208-Ecommerce-Project" text:style-name="Internet_20_link" text:visited-style-name="Visited_20_Internet_20_Link">https://github.com/abdullahimahid95/BIT3208-Ecommerce-Project</text:a></text:p>
      <text:p text:style-name="P3"/>
      <text:p text:style-name="P5">Table of Contents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1474_1606547852" text:style-name="Index_20_Link" text:visited-style-name="Index_20_Link">Week 1: Local Environment Setup<text:tab/>4</text:a></text:p>
          <text:p text:style-name="P7"><text:a xlink:type="simple" xlink:href="#__RefHeading___Toc1476_1606547852" text:style-name="Index_20_Link" text:visited-style-name="Index_20_Link">Fig 1: XAMPP Installation Success<text:tab/>4</text:a></text:p>
          <text:p text:style-name="P7"><text:a xlink:type="simple" xlink:href="#__RefHeading___Toc1478_1606547852" text:style-name="Index_20_Link" text:visited-style-name="Index_20_Link">Fig 2: Apache and MySQL Running<text:tab/>5</text:a></text:p>
          <text:p text:style-name="P7"><text:a xlink:type="simple" xlink:href="#__RefHeading___Toc1480_1606547852" text:style-name="Index_20_Link" text:visited-style-name="Index_20_Link">Fig 3: Localhost Test Page<text:tab/>6</text:a></text:p>
          <text:p text:style-name="P7"><text:a xlink:type="simple" xlink:href="#__RefHeading___Toc1482_1606547852" text:style-name="Index_20_Link" text:visited-style-name="Index_20_Link">Fig 4: Hello World Test Page<text:tab/>6</text:a></text:p>
          <text:p text:style-name="P7"><text:a xlink:type="simple" xlink:href="#__RefHeading___Toc1484_1606547852" text:style-name="Index_20_Link" text:visited-style-name="Index_20_Link">Fig 5: Database Connection Test<text:tab/>7</text:a></text:p>
          <text:p text:style-name="P6"><text:a xlink:type="simple" xlink:href="#__RefHeading___Toc1486_1606547852" text:style-name="Index_20_Link" text:visited-style-name="Index_20_Link"><text:span text:style-name="T5">Week 2 </text:span>: Wireframes and UI Design<text:tab/>8</text:a></text:p>
          <text:p text:style-name="P7"><text:a xlink:type="simple" xlink:href="#__RefHeading___Toc1488_1606547852" text:style-name="Index_20_Link" text:visited-style-name="Index_20_Link">Fig 1: Hand-Drawn Wireframe<text:tab/>8</text:a></text:p>
          <text:p text:style-name="P7"><text:a xlink:type="simple" xlink:href="#__RefHeading___Toc1490_1606547852" text:style-name="Index_20_Link" text:visited-style-name="Index_20_Link">Fig 2: Desktop Mockup<text:tab/>9</text:a></text:p>
          <text:p text:style-name="P7"><text:a xlink:type="simple" xlink:href="#__RefHeading___Toc1492_1606547852" text:style-name="Index_20_Link" text:visited-style-name="Index_20_Link">Fig 3: Mobile Mockup<text:tab/>10</text:a></text:p>
          <text:p text:style-name="P7"><text:a xlink:type="simple" xlink:href="#__RefHeading___Toc1494_1606547852" text:style-name="Index_20_Link" text:visited-style-name="Index_20_Link">Fig 4: Color Scheme<text:tab/>11</text:a></text:p>
          <text:p text:style-name="P7"><text:a xlink:type="simple" xlink:href="#__RefHeading___Toc1496_1606547852" text:style-name="Index_20_Link" text:visited-style-name="Index_20_Link">Fig 5: Navigation Structure<text:tab/>12</text:a></text:p>
          <text:p text:style-name="P6"><text:a xlink:type="simple" xlink:href="#__RefHeading___Toc1498_1606547852" text:style-name="Index_20_Link" text:visited-style-name="Index_20_Link">Week 3: Javascript and PHP basics<text:tab/>13</text:a></text:p>
          <text:p text:style-name="P7"><text:a xlink:type="simple" xlink:href="#__RefHeading___Toc1500_1606547852" text:style-name="Index_20_Link" text:visited-style-name="Index_20_Link">Fig 1: Registration form<text:tab/>13</text:a></text:p>
          <text:p text:style-name="P7"><text:a xlink:type="simple" xlink:href="#__RefHeading___Toc1502_1606547852" text:style-name="Index_20_Link" text:visited-style-name="Index_20_Link">Fig 2: Password Strength checker<text:tab/>13</text:a></text:p>
          <text:p text:style-name="P7"><text:a xlink:type="simple" xlink:href="#__RefHeading___Toc1504_1606547852" text:style-name="Index_20_Link" text:visited-style-name="Index_20_Link"><text:span text:style-name="T6">Fig 3:</text:span>DOM manipulation demo<text:tab/>14</text:a></text:p>
          <text:p text:style-name="P7"><text:a xlink:type="simple" xlink:href="#__RefHeading___Toc1506_1606547852" text:style-name="Index_20_Link" text:visited-style-name="Index_20_Link">Fig 4:PHP basics syntax page .<text:tab/>14</text:a></text:p>
          <text:p text:style-name="P7"><text:a xlink:type="simple" xlink:href="#__RefHeading___Toc1508_1606547852" text:style-name="Index_20_Link" text:visited-style-name="Index_20_Link">Fig 5 : Improved Database connection<text:tab/>15</text:a></text:p>
          <text:p text:style-name="P6"><text:a xlink:type="simple" xlink:href="#__RefHeading___Toc1510_1606547852" text:style-name="Index_20_Link" text:visited-style-name="Index_20_Link">Week 4: Backend Development and Authentication<text:tab/>16</text:a></text:p>
          <text:p text:style-name="P7"><text:a xlink:type="simple" xlink:href="#__RefHeading___Toc1512_1606547852" text:style-name="Index_20_Link" text:visited-style-name="Index_20_Link">Fig 1: Login Form UI<text:tab/>16</text:a></text:p>
          <text:p text:style-name="P7"><text:a xlink:type="simple" xlink:href="#__RefHeading___Toc1514_1606547852" text:style-name="Index_20_Link" text:visited-style-name="Index_20_Link"><text:soft-page-break/>Fig 2: Form Validation Error<text:tab/>16</text:a></text:p>
          <text:p text:style-name="P7"><text:a xlink:type="simple" xlink:href="#__RefHeading___Toc1516_1606547852" text:style-name="Index_20_Link" text:visited-style-name="Index_20_Link">Fig 3: PHP Form Processing Output<text:tab/>17</text:a></text:p>
          <text:p text:style-name="P7"><text:a xlink:type="simple" xlink:href="#__RefHeading___Toc1518_1606547852" text:style-name="Index_20_Link" text:visited-style-name="Index_20_Link">Fig 4: Session Check Page<text:tab/>17</text:a></text:p>
          <text:p text:style-name="P7"><text:a xlink:type="simple" xlink:href="#__RefHeading___Toc1520_1606547852" text:style-name="Index_20_Link" text:visited-style-name="Index_20_Link">Fig 5: Professional Folder Structure<text:tab/>18</text:a></text:p>
          <text:p text:style-name="P6"><text:a xlink:type="simple" xlink:href="#__RefHeading___Toc1522_1606547852" text:style-name="Index_20_Link" text:visited-style-name="Index_20_Link">Week 5: Database Integration and CRUD Operations<text:tab/>19</text:a></text:p>
          <text:p text:style-name="P7"><text:a xlink:type="simple" xlink:href="#__RefHeading___Toc1524_1606547852" text:style-name="Index_20_Link" text:visited-style-name="Index_20_Link">Fig 1: Database and Table Structure in phpMyAdmin<text:tab/>19</text:a></text:p>
          <text:p text:style-name="P7"><text:a xlink:type="simple" xlink:href="#__RefHeading___Toc1526_1606547852" text:style-name="Index_20_Link" text:visited-style-name="Index_20_Link">Fig 2: Add Product Form<text:tab/>19</text:a></text:p>
          <text:p text:style-name="P7"><text:a xlink:type="simple" xlink:href="#__RefHeading___Toc1470_1606547852" text:style-name="Index_20_Link" text:visited-style-name="Index_20_Link">Fig 3: Products Table View<text:tab/>20</text:a></text:p>
          <text:p text:style-name="P7"><text:a xlink:type="simple" xlink:href="#__RefHeading___Toc1528_1606547852" text:style-name="Index_20_Link" text:visited-style-name="Index_20_Link"><text:tab/>20</text:a></text:p>
          <text:p text:style-name="P7"><text:a xlink:type="simple" xlink:href="#__RefHeading___Toc1530_1606547852" text:style-name="Index_20_Link" text:visited-style-name="Index_20_Link">Fig 4: Edit Product<text:tab/>20</text:a></text:p>
          <text:p text:style-name="P7"><text:a xlink:type="simple" xlink:href="#__RefHeading___Toc1472_1606547852" text:style-name="Index_20_Link" text:visited-style-name="Index_20_Link">Fig 5: Delete Product<text:tab/>21</text:a></text:p>
          <text:p text:style-name="P7"><text:a xlink:type="simple" xlink:href="#__RefHeading___Toc1532_1606547852" text:style-name="Index_20_Link" text:visited-style-name="Index_20_Link"><text:tab/>21</text:a></text:p>
        </text:index-body>
      </text:table-of-content>
      <text:p text:style-name="P8"/>
      <text:p text:style-name="P8"/>
      <text:h text:style-name="P9" text:outline-level="1"><text:bookmark-start text:name="__RefHeading___Toc1474_1606547852"/>Week 1: Local Environment Setup<text:bookmark-end text:name="__RefHeading___Toc1474_1606547852"/></text:h>
      <text:p text:style-name="P10">Title: Installation and Testing of Local Development Environment </text:p>
      <text:h text:style-name="Heading_20_2" text:outline-level="2"><text:bookmark-start text:name="__RefHeading___Toc1476_1606547852"/>Fig 1: XAMPP Installation Success <text:bookmark-end text:name="__RefHeading___Toc1476_1606547852"/></text:h>
      <text:p text:style-name="P11"><draw:frame draw:style-name="fr2" draw:name="Image1" text:anchor-type="char" svg:width="4.7201in" svg:height="4.7201in" draw:z-index="0"><draw:image xlink:href="Pictures/100000010000035A000002861D67D48B.png" xlink:type="simple" xlink:show="embed" xlink:actuate="onLoad" draw:mime-type="image/png"/></draw:frame>Fig 1: XAMPP installation wizard showing successful setup . </text:p>
      <text:p text:style-name="P11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Heading_20_2" text:outline-level="2"><text:bookmark-start text:name="__RefHeading___Toc1478_1606547852"/>Fig 2: Apache and MySQL Running <text:bookmark-end text:name="__RefHeading___Toc1478_1606547852"/></text:h>
      <text:p text:style-name="P11"><draw:frame draw:style-name="fr2" draw:name="Image2" text:anchor-type="char" svg:width="4.7201in" svg:height="4.1902in" draw:z-index="1"><draw:image xlink:href="Pictures/10000001000003DE00000295C885A261.png" xlink:type="simple" xlink:show="embed" xlink:actuate="onLoad" draw:mime-type="image/png"/></draw:frame>Fig 2: XAMPP Control Panel showing Apache and MySQL running successfully. </text:p>
      <text:p text:style-name="P11"/>
      <text:h text:style-name="Heading_20_2" text:outline-level="2"><text:bookmark-start text:name="__RefHeading___Toc1480_1606547852"/><text:soft-page-break/>Fig 3: Localhost Test Page <text:bookmark-end text:name="__RefHeading___Toc1480_1606547852"/></text:h>
      <text:p text:style-name="P13"><draw:frame draw:style-name="fr2" draw:name="Image3" text:anchor-type="char" svg:width="4.7201in" svg:height="3.0701in" draw:z-index="2"><draw:image xlink:href="Pictures/100000010000077A000003A85DF9584C.png" xlink:type="simple" xlink:show="embed" xlink:actuate="onLoad" draw:mime-type="image/png"/></draw:frame>Fig 3: Browser displaying the XAMPP localhost welcome page confirming server is active. </text:p>
      <text:h text:style-name="Heading_20_2" text:outline-level="2"><text:bookmark-start text:name="__RefHeading___Toc1482_1606547852"/>Fig 4: Hello World Test Page <text:bookmark-end text:name="__RefHeading___Toc1482_1606547852"/></text:h>
      <text:p text:style-name="P13"><draw:frame draw:style-name="fr3" draw:name="Image4" text:anchor-type="char" svg:width="4.7201in" svg:height="3.0201in" draw:z-index="3"><draw:image xlink:href="Pictures/100000010000073C0000037C46B070DC.png" xlink:type="simple" xlink:show="embed" xlink:actuate="onLoad" draw:mime-type="image/png"/></draw:frame>Fig 4: Browser displaying Hello World output from index.php confirming PHP is working. </text:p>
      <text:p text:style-name="P14"/>
      <text:p text:style-name="P15"/>
      <text:h text:style-name="Heading_20_2" text:outline-level="2"><text:bookmark-start text:name="__RefHeading___Toc1484_1606547852"/><text:soft-page-break/>Fig 5: Database Connection Test <text:bookmark-end text:name="__RefHeading___Toc1484_1606547852"/></text:h>
      <text:p text:style-name="P13"><draw:frame draw:style-name="fr2" draw:name="Image5" text:anchor-type="char" svg:width="4.7201in" svg:height="3.4598in" draw:z-index="4"><draw:image xlink:href="Pictures/10000001000005B8000003289B6EBB8C.png" xlink:type="simple" xlink:show="embed" xlink:actuate="onLoad" draw:mime-type="image/png"/></draw:frame>Fig 5: Browser displaying successful database connection message using mysqli_connect() in PHP. </text:p>
      <text:p text:style-name="P14">Reflection: This week I installed XAMPP and configured Apache and MySQL services on my local machine. I tested the local server by accessing localhost on my browser and confirmed it was running correctly <text:span text:style-name="T7">then</text:span> I <text:s/><text:span text:style-name="T7">also </text:span>created a basic PHP Hello World page to verify server-side scripting was functional. Finally I tested database connectivity using mysqli_connect() which confirmed PHP and MySQL were properly linked. The main challenge was a UAC installation warning which was <text:span text:style-name="T7">solved</text:span> by installing XAMPP directly to C:\xampp instead of Program Files. </text:p>
      <text:h text:style-name="P9" text:outline-level="1"><text:bookmark-start text:name="__RefHeading___Toc1486_1606547852"/><text:span text:style-name="T8">Week 2 </text:span>: Wireframes and UI Design <text:bookmark-end text:name="__RefHeading___Toc1486_1606547852"/></text:h>
      <text:p text:style-name="P16">Title: Designing the Blackline Supply E-Commerce Interface .</text:p>
      <text:p text:style-name="P16"/>
      <text:h text:style-name="Heading_20_2" text:outline-level="2"><text:bookmark-start text:name="__RefHeading___Toc1488_1606547852"/>Fig 1: Hand-Drawn Wireframe<text:bookmark-end text:name="__RefHeading___Toc1488_1606547852"/></text:h>
      <text:p text:style-name="P16"><draw:frame draw:style-name="fr2" draw:name="Image6" text:anchor-type="char" svg:width="4.7409in" svg:height="5.1902in" draw:z-index="5"><draw:image xlink:href="Pictures/10000000000005E2000004DEEC062B6B.jpg" xlink:type="simple" xlink:show="embed" xlink:actuate="onLoad" draw:mime-type="image/jpeg"/></draw:frame><text:s/></text:p>
      <text:p text:style-name="P17">Fig 1: Hand-drawn wireframe showing the initial layout plan for the Blackline Supply homepage. </text:p>
      <text:p text:style-name="P17"/>
      <text:p text:style-name="P17"/>
      <text:p text:style-name="P17"/>
      <text:h text:style-name="Heading_20_2" text:outline-level="2"><text:bookmark-start text:name="__RefHeading___Toc1490_1606547852"/><text:soft-page-break/>Fig 2: Desktop Mockup <text:bookmark-end text:name="__RefHeading___Toc1490_1606547852"/></text:h>
      <text:p text:style-name="P18"><draw:frame draw:style-name="fr3" draw:name="Image7" text:anchor-type="char" svg:width="4.7402in" svg:height="3.95in" draw:z-index="7"><draw:image xlink:href="Pictures/1000000100000447000002B2C5226910.png" xlink:type="simple" xlink:show="embed" xlink:actuate="onLoad" draw:mime-type="image/png"/></draw:frame></text:p>
      <text:p text:style-name="P17">Fig 2: Draw.io desktop mockup showing the homepage layout of Blackline Supply at 1440x1024 resolution. 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<text:bookmark-start text:name="__RefHeading___Toc1492_1606547852"/><text:soft-page-break/>Fig 3: Mobile Mockup <text:bookmark-end text:name="__RefHeading___Toc1492_1606547852"/></text:h>
      <text:p text:style-name="P17"><draw:frame draw:style-name="fr2" draw:name="Image8" text:anchor-type="char" svg:width="4.7402in" svg:height="4.7701in" draw:z-index="6"><draw:image xlink:href="Pictures/100000010000029A0000032C5BA5690F.png" xlink:type="simple" xlink:show="embed" xlink:actuate="onLoad" draw:mime-type="image/png"/></draw:frame>Fig 3: Draw.io mobile mockup showing the responsive layout of Blackline Supply at 390x844 resolution. </text:p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<text:bookmark-start text:name="__RefHeading___Toc1494_1606547852"/><text:soft-page-break/>Fig 4: Color Scheme <text:bookmark-end text:name="__RefHeading___Toc1494_1606547852"/></text:h>
      <text:p text:style-name="P17"><draw:frame draw:style-name="fr3" draw:name="Image9" text:anchor-type="char" svg:width="4.7402in" svg:height="4.7701in" draw:z-index="8"><draw:image xlink:href="Pictures/100000010000023D00000291A5A749F0.png" xlink:type="simple" xlink:show="embed" xlink:actuate="onLoad" draw:mime-type="image/png"/></draw:frame>Fig 4: <text:s/><text:span text:style-name="T9">The c</text:span>ol<text:span text:style-name="T9">ou</text:span>r palette for Blackline Supply showing primary, secondary, accent and background colo<text:span text:style-name="T9">u</text:span>rs. </text:p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><text:soft-page-break/></text:p>
      <text:h text:style-name="Heading_20_2" text:outline-level="2"><text:bookmark-start text:name="__RefHeading___Toc1496_1606547852"/>Fig 5: Navigation Structure <text:bookmark-end text:name="__RefHeading___Toc1496_1606547852"/></text:h>
      <text:p text:style-name="P17"><draw:frame draw:style-name="fr3" draw:name="Image10" text:anchor-type="char" svg:width="4.7402in" svg:height="4.7701in" draw:z-index="9"><draw:image xlink:href="Pictures/1000000100000391000002B6419E8A49.png" xlink:type="simple" xlink:show="embed" xlink:actuate="onLoad" draw:mime-type="image/png"/></draw:frame>Fig 5: Flowchart showing the navigation structure and page connections of the Blackline Supply . </text:p>
      <text:p text:style-name="P17"/>
      <text:p text:style-name="P19">Reflection: This week I designed the visual layout of the Blackline supply ecommerce platform . <text:span text:style-name="T7">This helped me get a clearer picture of what the frontend structure would look like before beginning coding .</text:span> I began with a handrawn wireframe to plan the homepage layout then moving to the desktop and mobile mockups using draw.io . I also designed the <text:span text:style-name="T7">colour palette for the web application and finally the flowchart showing the navigation structure through also using draw.io . </text:span></text:p>
      <text:h text:style-name="P9" text:outline-level="1"><text:bookmark-start text:name="__RefHeading___Toc1498_1606547852"/>Week 3: Javascript and PHP basics<text:bookmark-end text:name="__RefHeading___Toc1498_1606547852"/></text:h>
      <text:p text:style-name="P20">Title :Implementing client-side validation and and testing server side scripting.</text:p>
      <text:h text:style-name="Heading_20_2" text:outline-level="2"><text:bookmark-start text:name="__RefHeading___Toc1500_1606547852"/>Fig 1: Registration form <text:bookmark-end text:name="__RefHeading___Toc1500_1606547852"/></text:h>
      <text:p text:style-name="P21"><draw:frame draw:style-name="fr2" draw:name="Image11" text:anchor-type="char" svg:width="4.7402in" svg:height="3.1in" draw:z-index="10"><draw:image xlink:href="Pictures/1000000100000760000003A6C06D8C4F.png" xlink:type="simple" xlink:show="embed" xlink:actuate="onLoad" draw:mime-type="image/png"/></draw:frame>Fig 1 showing registration form <text:span text:style-name="T10">for blackline supply with validation .</text:span></text:p>
      <text:h text:style-name="Heading_20_2" text:outline-level="2"><text:bookmark-start text:name="__RefHeading___Toc1502_1606547852"/>Fig 2: Password Strength checker<text:bookmark-end text:name="__RefHeading___Toc1502_1606547852"/></text:h>
      <text:p text:style-name="P22"><draw:frame draw:style-name="fr3" draw:name="Image12" text:anchor-type="char" svg:width="4.7402in" svg:height="3.2201in" draw:z-index="11"><draw:image xlink:href="Pictures/10000001000006FB0000039761EC5A0C.png" xlink:type="simple" xlink:show="embed" xlink:actuate="onLoad" draw:mime-type="image/png"/></draw:frame>fig 2: showing password strength checker working </text:p>
      <text:h text:style-name="Heading_20_2" text:outline-level="2"><text:bookmark-start text:name="__RefHeading___Toc1504_1606547852"/><text:soft-page-break/><text:span text:style-name="T11">Fig 3:</text:span><text:span text:style-name="T1">DOM manipulation demo </text:span><text:bookmark-end text:name="__RefHeading___Toc1504_1606547852"/></text:h>
      <text:p text:style-name="P23"><draw:frame draw:style-name="fr3" draw:name="Image13" text:anchor-type="char" svg:width="4.7402in" svg:height="3in" draw:z-index="12"><draw:image xlink:href="Pictures/100000010000074C0000037F08158C42.png" xlink:type="simple" xlink:show="embed" xlink:actuate="onLoad" draw:mime-type="image/png"/></draw:frame>fig 3 showing dom manipulation and products can be added and removed <text:s/>.</text:p>
      <text:h text:style-name="Heading_20_2" text:outline-level="2"><text:bookmark-start text:name="__RefHeading___Toc1506_1606547852"/>Fig 4:PHP basics syntax page .<text:bookmark-end text:name="__RefHeading___Toc1506_1606547852"/></text:h>
      <text:p text:style-name="P23"><draw:frame draw:style-name="fr3" draw:name="Image14" text:anchor-type="char" svg:width="4.7402in" svg:height="3.2098in" draw:z-index="13"><draw:image xlink:href="Pictures/10000001000006D20000037D26116B0C.png" xlink:type="simple" xlink:show="embed" xlink:actuate="onLoad" draw:mime-type="image/png"/></draw:frame>Fig 4 Php basics page showing variables , conditionals and arrays </text:p>
      <text:p text:style-name="P23"/>
      <text:p text:style-name="P23"/>
      <text:p text:style-name="P23"/>
      <text:p text:style-name="P23"/>
      <text:h text:style-name="Heading_20_2" text:outline-level="2"><text:bookmark-start text:name="__RefHeading___Toc1508_1606547852"/><text:soft-page-break/>Fig <text:span text:style-name="T12">5</text:span> : Improved Database connection <text:bookmark-end text:name="__RefHeading___Toc1508_1606547852"/></text:h>
      <text:p text:style-name="P24"><draw:frame draw:style-name="fr3" draw:name="Image15" text:anchor-type="char" svg:width="4.7402in" svg:height="3.0402in" draw:z-index="14"><draw:image xlink:href="Pictures/100000010000073C0000038383CD7A8A.png" xlink:type="simple" xlink:show="embed" xlink:actuate="onLoad" draw:mime-type="image/png"/></draw:frame>Fig 5 showing php database connection confirming succesful connection to the database.</text:p>
      <text:p text:style-name="P25"><text:span text:style-name="T13">Reflection - </text:span><text:span text:style-name="T14">T</text:span>his week I implemented JavaScript form validation and a password strength checker for the Blackline Supply registration page. I also built a DOM manipulation demo showing how to dynamically add, update and remove elements <text:span text:style-name="T15">and</text:span> I <text:s/><text:span text:style-name="T15">also</text:span>tested PHP syntax using variables, conditionals, arrays and loops, and improved the database connection script with detailed output confirmation. <text:s/></text:p>
      <text:h text:style-name="P9" text:outline-level="1"><text:bookmark-start text:name="__RefHeading___Toc1510_1606547852"/>Week 4: Backend Development and Authentication <text:bookmark-end text:name="__RefHeading___Toc1510_1606547852"/></text:h>
      <text:h text:style-name="Heading_20_2" text:outline-level="2"><text:bookmark-start text:name="__RefHeading___Toc1512_1606547852"/>Fig 1: Login Form UI <text:bookmark-end text:name="__RefHeading___Toc1512_1606547852"/></text:h>
      <text:p text:style-name="P26"><draw:frame draw:style-name="fr3" draw:name="Image16" text:anchor-type="char" svg:width="4.7402in" svg:height="3.0598in" draw:z-index="15"><draw:image xlink:href="Pictures/100000010000075E000003994AA31419.png" xlink:type="simple" xlink:show="embed" xlink:actuate="onLoad" draw:mime-type="image/png"/></draw:frame>f<text:span text:style-name="T16">ig1:Blackline login form showing username and password fields.</text:span></text:p>
      <text:p text:style-name="P26"/>
      <text:h text:style-name="Heading_20_2" text:outline-level="2"><text:bookmark-start text:name="__RefHeading___Toc1514_1606547852"/>Fig 2: Form Validation Error <text:bookmark-end text:name="__RefHeading___Toc1514_1606547852"/></text:h>
      <text:p text:style-name="P27"><draw:frame draw:style-name="fr2" draw:name="Image17" text:anchor-type="char" svg:width="4.7402in" svg:height="3.05in" draw:z-index="16"><draw:image xlink:href="Pictures/100000010000074500000388D3E7BD6A.png" xlink:type="simple" xlink:show="embed" xlink:actuate="onLoad" draw:mime-type="image/png"/></draw:frame>fig 2:login form showing error message after wrong credentials entered</text:p>
      <text:p text:style-name="P27"/>
      <text:p text:style-name="P27"><text:soft-page-break/></text:p>
      <text:h text:style-name="Heading_20_2" text:outline-level="2"><text:bookmark-start text:name="__RefHeading___Toc1516_1606547852"/>Fig 3: PHP Form Processing Output <text:bookmark-end text:name="__RefHeading___Toc1516_1606547852"/></text:h>
      <text:p text:style-name="P27"><draw:frame draw:style-name="fr3" draw:name="Image18" text:anchor-type="char" svg:width="4.7402in" svg:height="3.0402in" draw:z-index="17"><draw:image xlink:href="Pictures/10000001000007330000037D7E4CA6FA.png" xlink:type="simple" xlink:show="embed" xlink:actuate="onLoad" draw:mime-type="image/png"/></draw:frame>fig 3: Welcome page confirming succes<text:span text:style-name="T17">sful PHP form processing after successful login.</text:span></text:p>
      <text:p text:style-name="P27"/>
      <text:h text:style-name="Heading_20_2" text:outline-level="2"><text:bookmark-start text:name="__RefHeading___Toc1518_1606547852"/>Fig 4: Session Check Page <text:bookmark-end text:name="__RefHeading___Toc1518_1606547852"/></text:h>
      <text:p text:style-name="P28"><draw:frame draw:style-name="fr2" draw:name="Image19" text:anchor-type="char" svg:width="4.7402in" svg:height="2.9799in" draw:z-index="18"><draw:image xlink:href="Pictures/100000010000074D00000379D5244B78.png" xlink:type="simple" xlink:show="embed" xlink:actuate="onLoad" draw:mime-type="image/png"/></draw:frame><text:span text:style-name="T18">fig 4:</text:span>Session check page <text:span text:style-name="T17">showing</text:span> the active session ID and logged in user confirming sessions are working correctly. </text:p>
      <text:p text:style-name="P28"/>
      <text:p text:style-name="P28"><text:soft-page-break/></text:p>
      <text:h text:style-name="Heading_20_2" text:outline-level="2"><text:bookmark-start text:name="__RefHeading___Toc1520_1606547852"/>Fig 5: Professional Folder Structure <text:bookmark-end text:name="__RefHeading___Toc1520_1606547852"/></text:h>
      <text:p text:style-name="P29"><draw:frame draw:style-name="fr3" draw:name="Image20" text:anchor-type="char" svg:width="4.7402in" svg:height="3.1701in" draw:z-index="19"><draw:image xlink:href="Pictures/10000001000007210000039B94A69F0E.png" xlink:type="simple" xlink:show="embed" xlink:actuate="onLoad" draw:mime-type="image/png"/></draw:frame>Fig 5: VS Code showing the professional folder structure of the Week 4 backend project. </text:p>
      <text:p text:style-name="P29"/>
      <text:p text:style-name="P28"><text:span text:style-name="T17">Reflection: </text:span>This week I built a session-based authentication system for Blackline Supply. I created a login form that submits credentials to a PHP processing page which validates input and creates a session on success. Invalid credentials redirect back with an error message while valid credentials grant access to <text:span text:style-name="T17">a </text:span>welcome page. I also implemented a logout system that <text:span text:style-name="T17">end</text:span>s the session and a session check page to verify active sessions. Files were organized using a professional folder structure separating CSS, JavaScript, images, database and includes. </text:p>
      <text:h text:style-name="P9" text:outline-level="1"><text:bookmark-start text:name="__RefHeading___Toc1522_1606547852"/>Week 5: Database Integration and CRUD Operations <text:bookmark-end text:name="__RefHeading___Toc1522_1606547852"/></text:h>
      <text:h text:style-name="Heading_20_2" text:outline-level="2"><text:bookmark-start text:name="__RefHeading___Toc1524_1606547852"/>Fig 1: Database and Table Structure in phpMyAdmin<text:bookmark-end text:name="__RefHeading___Toc1524_1606547852"/></text:h>
      <text:p text:style-name="P30"><draw:frame draw:style-name="fr3" draw:name="Image21" text:anchor-type="char" svg:width="4.7402in" svg:height="2.8299in" draw:z-index="20"><draw:image xlink:href="Pictures/10000001000006DC0000031988AC876A.png" xlink:type="simple" xlink:show="embed" xlink:actuate="onLoad" draw:mime-type="image/png"/></draw:frame>Fig 1: phpMyAdmin showing the blackline_supply database with the products table structure </text:p>
      <text:h text:style-name="Heading_20_2" text:outline-level="2"><text:bookmark-start text:name="__RefHeading___Toc1526_1606547852"/>Fig 2: Add Product Form <text:bookmark-end text:name="__RefHeading___Toc1526_1606547852"/></text:h>
      <text:p text:style-name="P30"><draw:frame draw:style-name="fr2" draw:name="Image22" text:anchor-type="char" svg:width="4.7402in" svg:height="3in" draw:z-index="21"><draw:image xlink:href="Pictures/100000010000073E0000037715D281B7.png" xlink:type="simple" xlink:show="embed" xlink:actuate="onLoad" draw:mime-type="image/png"/></draw:frame>Fig 2: Add product form successfully inserting a new product into the database. </text:p>
      <text:p text:style-name="P30"/>
      <text:p text:style-name="P30"/>
      <text:p text:style-name="P30"/>
      <text:h text:style-name="Heading_20_2" text:outline-level="2"><text:bookmark-start text:name="__RefHeading___Toc1528_1606547852"/><text:soft-page-break/><draw:frame draw:style-name="fr4" draw:name="Frame1" text:anchor-type="as-char" draw:z-index="26"><draw:text-box fo:min-height="0in" fo:min-width="0in"><text:h text:style-name="P31" text:outline-level="2"><text:bookmark-start text:name="__RefHeading___Toc1470_1606547852"/>Fig 3: Products Table View<text:bookmark-end text:name="__RefHeading___Toc1470_1606547852"/></text:h></draw:text-box></draw:frame><text:s/><text:bookmark-end text:name="__RefHeading___Toc1528_1606547852"/></text:h>
      <text:p text:style-name="P30"><draw:frame draw:style-name="fr3" draw:name="Image23" text:anchor-type="char" svg:width="4.7402in" svg:height="3.0299in" draw:z-index="22"><draw:image xlink:href="Pictures/100000010000073D0000038126625B14.png" xlink:type="simple" xlink:show="embed" xlink:actuate="onLoad" draw:mime-type="image/png"/></draw:frame>Fig 3: Index page displaying all products retrieved from the database . </text:p>
      <text:h text:style-name="Heading_20_2" text:outline-level="2"><text:bookmark-start text:name="__RefHeading___Toc1530_1606547852"/>Fig 4: Edit Product <text:bookmark-end text:name="__RefHeading___Toc1530_1606547852"/></text:h>
      <text:p text:style-name="P30"><draw:frame draw:style-name="fr2" draw:name="Image24" text:anchor-type="char" svg:width="4.7402in" svg:height="2.9701in" draw:z-index="23"><draw:image xlink:href="Pictures/10000001000007360000036A519C83EE.png" xlink:type="simple" xlink:show="embed" xlink:actuate="onLoad" draw:mime-type="image/png"/></draw:frame>Fig 4: Edit product page showing successful update of a product record in the database. </text:p>
      <text:p text:style-name="P30"/>
      <text:p text:style-name="P30"/>
      <text:p text:style-name="P30"/>
      <text:p text:style-name="P30"/>
      <text:h text:style-name="Heading_20_2" text:outline-level="2"><text:bookmark-start text:name="__RefHeading___Toc1532_1606547852"/><text:soft-page-break/><draw:frame draw:style-name="fr4" draw:name="Frame2" text:anchor-type="as-char" draw:z-index="27"><draw:text-box fo:min-height="0in" fo:min-width="0in"><text:h text:style-name="P31" text:outline-level="2"><text:bookmark-start text:name="__RefHeading___Toc1472_1606547852"/>Fig 5: Delete Product<text:bookmark-end text:name="__RefHeading___Toc1472_1606547852"/></text:h></draw:text-box></draw:frame><text:bookmark-end text:name="__RefHeading___Toc1532_1606547852"/></text:h>
      <text:p text:style-name="P30"><draw:frame draw:style-name="fr3" draw:name="Image25" text:anchor-type="char" svg:width="4.7402in" svg:height="3.1098in" draw:z-index="24"><draw:image xlink:href="Pictures/10000001000007450000039AEAF7798A.png" xlink:type="simple" xlink:show="embed" xlink:actuate="onLoad" draw:mime-type="image/png"/></draw:frame>Fig 5: Products table showing success message after a product was deleted from the database </text:p>
      <text:p text:style-name="P30"/>
      <text:p text:style-name="P32"><text:span text:style-name="T19">Reflection : </text:span>This week I built a functional CRUD product management system for Blackline Supply. I created the blackline_supply database and products table in phpMyAdmin <text:span text:style-name="T20">and</text:span> I then built four PHP pages handling Create, Read, Update and Delete operations connected to the database through a reusable includes/db.php connection file. The system allows adding new products, viewing all records in a styled table, editing existing products and deleting records with a confirmation prompt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99in" fo:margin-bottom="0.0799in" style:contextual-spacing="false" fo:line-height="150%" fo:text-align="justify" style:justify-single-word="false" fo:text-indent="0.5in" style:auto-text-indent="false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0736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11:18:50.804529300</meta:creation-date>
    <dc:title>E Commerce report template</dc:title>
    <meta:editing-duration>PT3H37M31S</meta:editing-duration>
    <meta:editing-cycles>10</meta:editing-cycles>
    <meta:generator>LibreOffice/25.2.7.2$Windows_X86_64 LibreOffice_project/5cbfd1ab6520636bb5f7b99185aa69bd7456825d</meta:generator>
    <dc:date>2026-06-08T18:11:51.834788800</dc:date>
    <meta:print-date>2026-06-08T14:50:04.997800200</meta:print-date>
    <meta:printed-by>PDF files</meta:printed-by>
    <meta:document-statistic meta:table-count="0" meta:image-count="26" meta:object-count="0" meta:page-count="21" meta:paragraph-count="111" meta:word-count="1116" meta:character-count="7104" meta:non-whitespace-character-count="6034"/>
    <meta:template xlink:type="simple" xlink:actuate="onRequest" xlink:title="E Commerce report template" xlink:href="../../../../../Users/m9nsu/AppData/Roaming/LibreOffice/4/user/template/E%20Commerce%20report%20template.ott" meta:date="2026-05-24T11:18:50.279235600"/>
  </office:meta>
</office:document-meta>
</file>